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3be6" officeooo:paragraph-rsid="001d3be6"/>
    </style:style>
    <style:style style:name="P2" style:family="paragraph" style:parent-style-name="Standard">
      <style:text-properties officeooo:rsid="001d3be6" officeooo:paragraph-rsid="003dd3d0"/>
    </style:style>
    <style:style style:name="P3" style:family="paragraph" style:parent-style-name="Standard">
      <style:text-properties officeooo:rsid="001d3be6" officeooo:paragraph-rsid="00441d2a"/>
    </style:style>
    <style:style style:name="P4" style:family="paragraph" style:parent-style-name="Standard">
      <style:text-properties fo:font-weight="bold" officeooo:rsid="001d3be6" officeooo:paragraph-rsid="001d3be6" style:font-weight-asian="bold" style:font-weight-complex="bold"/>
    </style:style>
    <style:style style:name="P5" style:family="paragraph" style:parent-style-name="Standard">
      <style:text-properties fo:font-weight="bold" officeooo:rsid="00260021" officeooo:paragraph-rsid="00260021" style:font-weight-asian="bold" style:font-weight-complex="bold"/>
    </style:style>
    <style:style style:name="P6" style:family="paragraph" style:parent-style-name="Standard">
      <style:text-properties fo:font-weight="bold" officeooo:rsid="0028f86b" officeooo:paragraph-rsid="0028f86b" style:font-weight-asian="bold" style:font-weight-complex="bold"/>
    </style:style>
    <style:style style:name="P7" style:family="paragraph" style:parent-style-name="Standard">
      <style:text-properties fo:font-weight="bold" officeooo:rsid="002d3ee8" officeooo:paragraph-rsid="004a22d9" style:font-weight-asian="bold" style:font-weight-complex="bold"/>
    </style:style>
    <style:style style:name="P8" style:family="paragraph" style:parent-style-name="Standard">
      <style:text-properties fo:font-weight="bold" officeooo:rsid="002fb6e5" officeooo:paragraph-rsid="002fb6e5" style:font-weight-asian="bold" style:font-weight-complex="bold"/>
    </style:style>
    <style:style style:name="P9" style:family="paragraph" style:parent-style-name="Standard">
      <style:text-properties fo:font-weight="bold" officeooo:rsid="002fb6e5" officeooo:paragraph-rsid="003dd3d0" style:font-weight-asian="bold" style:font-weight-complex="bold"/>
    </style:style>
    <style:style style:name="P10" style:family="paragraph" style:parent-style-name="Standard">
      <style:text-properties fo:font-weight="bold" officeooo:rsid="0031ebbc" officeooo:paragraph-rsid="0031ebbc" style:font-weight-asian="bold" style:font-weight-complex="bold"/>
    </style:style>
    <style:style style:name="P11" style:family="paragraph" style:parent-style-name="Standard">
      <style:text-properties fo:font-weight="bold" officeooo:rsid="00330390" officeooo:paragraph-rsid="00330390" style:font-weight-asian="bold" style:font-weight-complex="bold"/>
    </style:style>
    <style:style style:name="P12" style:family="paragraph" style:parent-style-name="Standard">
      <style:text-properties fo:font-weight="bold" officeooo:rsid="00347ad6" officeooo:paragraph-rsid="00347ad6" style:font-weight-asian="bold" style:font-weight-complex="bold"/>
    </style:style>
    <style:style style:name="P13" style:family="paragraph" style:parent-style-name="Standard">
      <style:text-properties fo:font-weight="bold" officeooo:rsid="0035fe97" officeooo:paragraph-rsid="00441d2a" style:font-weight-asian="bold" style:font-weight-complex="bold"/>
    </style:style>
    <style:style style:name="P14" style:family="paragraph" style:parent-style-name="Standard">
      <style:text-properties fo:font-weight="bold" officeooo:rsid="00217fc4" officeooo:paragraph-rsid="00217fc4" style:font-weight-asian="bold" style:font-weight-complex="bold"/>
    </style:style>
    <style:style style:name="P15" style:family="paragraph" style:parent-style-name="Standard">
      <style:text-properties fo:font-weight="bold" officeooo:rsid="002a34bf" officeooo:paragraph-rsid="002a34bf" style:font-weight-asian="bold" style:font-weight-complex="bold"/>
    </style:style>
    <style:style style:name="P16" style:family="paragraph" style:parent-style-name="Standard">
      <style:text-properties fo:font-weight="bold" officeooo:rsid="00308b17" officeooo:paragraph-rsid="00308b17" style:font-weight-asian="bold" style:font-weight-complex="bold"/>
    </style:style>
    <style:style style:name="P17" style:family="paragraph" style:parent-style-name="Standard">
      <style:text-properties fo:font-size="14pt" fo:font-weight="bold" officeooo:rsid="001d3be6" officeooo:paragraph-rsid="001d3be6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40a399" officeooo:paragraph-rsid="0040a399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rsid="00217fc4" officeooo:paragraph-rsid="00217fc4"/>
    </style:style>
    <style:style style:name="P20" style:family="paragraph" style:parent-style-name="Standard">
      <style:text-properties officeooo:rsid="00217fc4" officeooo:paragraph-rsid="001d3be6"/>
    </style:style>
    <style:style style:name="P21" style:family="paragraph" style:parent-style-name="Standard">
      <style:text-properties officeooo:rsid="0021b836" officeooo:paragraph-rsid="00217fc4"/>
    </style:style>
    <style:style style:name="P22" style:family="paragraph" style:parent-style-name="Standard">
      <style:text-properties officeooo:rsid="002273a1" officeooo:paragraph-rsid="002273a1"/>
    </style:style>
    <style:style style:name="P23" style:family="paragraph" style:parent-style-name="Standard">
      <style:text-properties officeooo:rsid="002273a1" officeooo:paragraph-rsid="004299b2"/>
    </style:style>
    <style:style style:name="P24" style:family="paragraph" style:parent-style-name="Standard">
      <style:text-properties officeooo:rsid="002273a1" officeooo:paragraph-rsid="00260021"/>
    </style:style>
    <style:style style:name="P25" style:family="paragraph" style:parent-style-name="Standard">
      <style:text-properties officeooo:rsid="00260021" officeooo:paragraph-rsid="00260021"/>
    </style:style>
    <style:style style:name="P26" style:family="paragraph" style:parent-style-name="Standard">
      <style:text-properties officeooo:rsid="00260021" officeooo:paragraph-rsid="00330390"/>
    </style:style>
    <style:style style:name="P27" style:family="paragraph" style:parent-style-name="Standard">
      <style:text-properties officeooo:rsid="00271af0" officeooo:paragraph-rsid="00271af0"/>
    </style:style>
    <style:style style:name="P28" style:family="paragraph" style:parent-style-name="Standard">
      <style:text-properties officeooo:rsid="0028f86b" officeooo:paragraph-rsid="0028f86b"/>
    </style:style>
    <style:style style:name="P29" style:family="paragraph" style:parent-style-name="Standard">
      <style:text-properties officeooo:rsid="002a34bf" officeooo:paragraph-rsid="002a34bf"/>
    </style:style>
    <style:style style:name="P30" style:family="paragraph" style:parent-style-name="Standard">
      <style:text-properties officeooo:rsid="002aef83" officeooo:paragraph-rsid="002aef83"/>
    </style:style>
    <style:style style:name="P31" style:family="paragraph" style:parent-style-name="Standard">
      <style:text-properties fo:font-weight="normal" officeooo:rsid="001d3be6" officeooo:paragraph-rsid="001d3be6" style:font-weight-asian="normal" style:font-weight-complex="normal"/>
    </style:style>
    <style:style style:name="P32" style:family="paragraph" style:parent-style-name="Standard">
      <style:text-properties fo:font-weight="normal" officeooo:rsid="002bc37f" officeooo:paragraph-rsid="002bc37f" style:font-weight-asian="normal" style:font-weight-complex="normal"/>
    </style:style>
    <style:style style:name="P33" style:family="paragraph" style:parent-style-name="Standard">
      <style:text-properties fo:font-weight="normal" officeooo:rsid="002d3ee8" officeooo:paragraph-rsid="002d3ee8" style:font-weight-asian="normal" style:font-weight-complex="normal"/>
    </style:style>
    <style:style style:name="P34" style:family="paragraph" style:parent-style-name="Standard">
      <style:text-properties fo:font-weight="normal" officeooo:rsid="002d3ee8" officeooo:paragraph-rsid="004a22d9" style:font-weight-asian="normal" style:font-weight-complex="normal"/>
    </style:style>
    <style:style style:name="P35" style:family="paragraph" style:parent-style-name="Standard">
      <style:text-properties fo:font-weight="normal" officeooo:rsid="002fb6e5" officeooo:paragraph-rsid="002fb6e5" style:font-weight-asian="normal" style:font-weight-complex="normal"/>
    </style:style>
    <style:style style:name="P36" style:family="paragraph" style:parent-style-name="Standard">
      <style:text-properties officeooo:paragraph-rsid="002bc37f"/>
    </style:style>
    <style:style style:name="P37" style:family="paragraph" style:parent-style-name="Standard">
      <style:text-properties officeooo:rsid="002bc37f" officeooo:paragraph-rsid="002bc37f"/>
    </style:style>
    <style:style style:name="P38" style:family="paragraph" style:parent-style-name="Standard">
      <style:text-properties officeooo:rsid="002fb6e5" officeooo:paragraph-rsid="002fb6e5"/>
    </style:style>
    <style:style style:name="P39" style:family="paragraph" style:parent-style-name="Standard">
      <style:text-properties officeooo:rsid="002fb6e5" officeooo:paragraph-rsid="003dd3d0"/>
    </style:style>
    <style:style style:name="P40" style:family="paragraph" style:parent-style-name="Standard">
      <style:text-properties fo:font-size="11pt" fo:font-weight="bold" officeooo:rsid="002fb6e5" officeooo:paragraph-rsid="002fb6e5" style:font-size-asian="11pt" style:font-weight-asian="bold" style:font-size-complex="11pt" style:font-weight-complex="bold"/>
    </style:style>
    <style:style style:name="P41" style:family="paragraph" style:parent-style-name="Standard">
      <style:text-properties fo:font-size="11pt" fo:font-weight="bold" officeooo:rsid="0031ebbc" officeooo:paragraph-rsid="0031ebbc" style:font-size-asian="11pt" style:font-weight-asian="bold" style:font-size-complex="11pt" style:font-weight-complex="bold"/>
    </style:style>
    <style:style style:name="P42" style:family="paragraph" style:parent-style-name="Standard">
      <style:text-properties fo:font-size="11pt" fo:font-weight="bold" officeooo:rsid="00347ad6" officeooo:paragraph-rsid="00347ad6" style:font-size-asian="11pt" style:font-weight-asian="bold" style:font-size-complex="11pt" style:font-weight-complex="bold"/>
    </style:style>
    <style:style style:name="P43" style:family="paragraph" style:parent-style-name="Standard">
      <style:text-properties fo:font-size="11pt" fo:font-weight="bold" officeooo:rsid="003f7023" officeooo:paragraph-rsid="003f7023" style:font-size-asian="11pt" style:font-weight-asian="bold" style:font-size-complex="11pt" style:font-weight-complex="bold"/>
    </style:style>
    <style:style style:name="P44" style:family="paragraph" style:parent-style-name="Standard">
      <style:text-properties fo:font-size="18pt" fo:font-weight="bold" officeooo:rsid="001d3be6" officeooo:paragraph-rsid="001d3be6" style:font-size-asian="18pt" style:font-weight-asian="bold" style:font-size-complex="18pt" style:font-weight-complex="bold"/>
    </style:style>
    <style:style style:name="P45" style:family="paragraph" style:parent-style-name="Standard">
      <style:text-properties officeooo:rsid="00308b17" officeooo:paragraph-rsid="00308b17"/>
    </style:style>
    <style:style style:name="P46" style:family="paragraph" style:parent-style-name="Standard">
      <style:text-properties officeooo:rsid="0031ebbc" officeooo:paragraph-rsid="0031ebbc"/>
    </style:style>
    <style:style style:name="P47" style:family="paragraph" style:parent-style-name="Standard">
      <style:text-properties fo:font-size="10pt" officeooo:rsid="0031ebbc" officeooo:paragraph-rsid="0031ebbc" style:font-size-asian="10pt" style:font-size-complex="10pt"/>
    </style:style>
    <style:style style:name="P48" style:family="paragraph" style:parent-style-name="Standard">
      <style:text-properties fo:font-size="10pt" officeooo:rsid="0037e7a2" officeooo:paragraph-rsid="00441d2a" style:font-size-asian="10pt" style:font-size-complex="10pt"/>
    </style:style>
    <style:style style:name="P49" style:family="paragraph" style:parent-style-name="Standard">
      <style:text-properties fo:font-size="10pt" fo:font-weight="normal" officeooo:rsid="003f7023" officeooo:paragraph-rsid="003f7023" style:font-size-asian="10pt" style:font-weight-asian="normal" style:font-size-complex="10pt" style:font-weight-complex="normal"/>
    </style:style>
    <style:style style:name="P50" style:family="paragraph" style:parent-style-name="Standard">
      <style:text-properties officeooo:rsid="00330390" officeooo:paragraph-rsid="00330390"/>
    </style:style>
    <style:style style:name="P51" style:family="paragraph" style:parent-style-name="Standard">
      <style:text-properties officeooo:rsid="00347ad6" officeooo:paragraph-rsid="00347ad6"/>
    </style:style>
    <style:style style:name="P52" style:family="paragraph" style:parent-style-name="Standard">
      <style:text-properties officeooo:rsid="0035fe97" officeooo:paragraph-rsid="00441d2a"/>
    </style:style>
    <style:style style:name="P53" style:family="paragraph" style:parent-style-name="Standard">
      <style:text-properties officeooo:rsid="0037e7a2" officeooo:paragraph-rsid="00441d2a"/>
    </style:style>
    <style:style style:name="P54" style:family="paragraph" style:parent-style-name="Standard">
      <style:text-properties officeooo:rsid="0038f5ee" officeooo:paragraph-rsid="0038f5ee"/>
    </style:style>
    <style:style style:name="P55" style:family="paragraph" style:parent-style-name="Standard">
      <style:text-properties officeooo:rsid="0039768f" officeooo:paragraph-rsid="0039768f"/>
    </style:style>
    <style:style style:name="P56" style:family="paragraph" style:parent-style-name="Standard">
      <style:text-properties officeooo:rsid="003dd3d0" officeooo:paragraph-rsid="003dd3d0"/>
    </style:style>
    <style:style style:name="P57" style:family="paragraph" style:parent-style-name="Standard">
      <style:text-properties fo:font-size="12pt" fo:font-weight="normal" officeooo:rsid="0040a399" officeooo:paragraph-rsid="0040a399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0.5pt" fo:font-weight="normal" officeooo:rsid="0040a399" officeooo:paragraph-rsid="0040a399" style:font-size-asian="9.14999961853027pt" style:font-weight-asian="normal" style:font-size-complex="10.5pt" style:font-weight-complex="normal"/>
    </style:style>
    <style:style style:name="P59" style:family="paragraph" style:parent-style-name="Text_20_body">
      <style:text-properties officeooo:rsid="001d3be6" officeooo:paragraph-rsid="001d3be6"/>
    </style:style>
    <style:style style:name="P60" style:family="paragraph">
      <loext:graphic-properties draw:fill="none" draw:fill-color="#ffffff"/>
      <style:text-properties fo:font-size="12pt"/>
    </style:style>
    <style:style style:name="P61" style:family="paragraph">
      <style:text-properties style:font-name="F" fo:font-size="12pt"/>
    </style:style>
    <style:style style:name="P62" style:family="paragraph">
      <loext:graphic-properties draw:fill="none" draw:fill-color="#ffffff"/>
      <style:text-properties style:font-name="F" fo:font-size="12pt"/>
    </style:style>
    <style:style style:name="T1" style:family="text">
      <style:text-properties officeooo:rsid="002273a1"/>
    </style:style>
    <style:style style:name="T2" style:family="text">
      <style:text-properties officeooo:rsid="00260021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style:font-name="Liberation Serif" fo:font-weight="normal" officeooo:rsid="002bc37f" style:font-weight-asian="normal" style:font-weight-complex="normal"/>
    </style:style>
    <style:style style:name="T6" style:family="text">
      <style:text-properties style:font-name="Liberation Serif" fo:font-weight="normal" officeooo:rsid="002d3ee8" style:font-weight-asian="normal" style:font-weight-complex="normal"/>
    </style:style>
    <style:style style:name="T7" style:family="text">
      <style:text-properties style:font-name="Liberation Serif" officeooo:rsid="00308b17"/>
    </style:style>
    <style:style style:name="T8" style:family="text">
      <style:text-properties style:font-name="Liberation Serif" officeooo:rsid="00330390"/>
    </style:style>
    <style:style style:name="T9" style:family="text">
      <style:text-properties style:font-name="Liberation Serif" fo:font-weight="bold" style:font-weight-asian="bold" style:font-weight-complex="bold"/>
    </style:style>
    <style:style style:name="T10" style:family="text">
      <style:text-properties style:font-name="Liberation Serif" officeooo:rsid="003dd3d0"/>
    </style:style>
    <style:style style:name="T11" style:family="text">
      <style:text-properties style:font-name="Liberation Serif" officeooo:rsid="004299b2"/>
    </style:style>
    <style:style style:name="T12" style:family="text">
      <style:text-properties style:font-name="Liberation Serif1"/>
    </style:style>
    <style:style style:name="T13" style:family="text">
      <style:text-properties style:font-name="Liberation Serif1" officeooo:rsid="003dd3d0"/>
    </style:style>
    <style:style style:name="T14" style:family="text">
      <style:text-properties style:font-name="Liberation Serif1" officeooo:rsid="004299b2"/>
    </style:style>
    <style:style style:name="T15" style:family="text">
      <style:text-properties officeooo:rsid="00271af0"/>
    </style:style>
    <style:style style:name="T16" style:family="text">
      <style:text-properties officeooo:rsid="002aef83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bc37f" style:font-weight-asian="normal" style:font-weight-complex="normal"/>
    </style:style>
    <style:style style:name="T19" style:family="text">
      <style:text-properties fo:background-color="#dee6ef" loext:char-shading-value="0"/>
    </style:style>
    <style:style style:name="T20" style:family="text">
      <style:text-properties officeooo:rsid="002d3ee8"/>
    </style:style>
    <style:style style:name="T21" style:family="text">
      <style:text-properties officeooo:rsid="002fb6e5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7e7a2" style:font-weight-asian="bold" style:font-weight-complex="bold"/>
    </style:style>
    <style:style style:name="T24" style:family="text">
      <style:text-properties officeooo:rsid="00308b17"/>
    </style:style>
    <style:style style:name="T25" style:family="text">
      <style:text-properties officeooo:rsid="0031ebbc"/>
    </style:style>
    <style:style style:name="T26" style:family="text">
      <style:text-properties officeooo:rsid="00347ad6"/>
    </style:style>
    <style:style style:name="T27" style:family="text">
      <style:text-properties officeooo:rsid="0037e7a2"/>
    </style:style>
    <style:style style:name="T28" style:family="text">
      <style:text-properties officeooo:rsid="0039768f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officeooo:rsid="003dd3d0"/>
    </style:style>
    <style:style style:name="T32" style:family="text">
      <style:text-properties fo:font-size="11pt" fo:font-weight="bold" style:font-size-asian="11pt" style:font-weight-asian="bold" style:font-size-complex="11pt" style:font-weight-complex="bold"/>
    </style:style>
    <style:style style:name="T33" style:family="text">
      <style:text-properties fo:font-size="11pt" fo:font-weight="bold" officeooo:rsid="004b816f" style:font-size-asian="11pt" style:font-weight-asian="bold" style:font-size-complex="11pt" style:font-weight-complex="bold"/>
    </style:style>
    <style:style style:name="T34" style:family="text">
      <style:text-properties officeooo:rsid="004299b2"/>
    </style:style>
    <style:style style:name="T35" style:family="text">
      <style:text-properties officeooo:rsid="004b816f"/>
    </style:style>
    <style:style style:name="T36" style:family="text">
      <style:text-properties style:font-name="Liberation Serif1" fo:font-size="11pt" fo:font-weight="bold" style:font-name-asian="Noto Serif CJK SC" style:font-size-asian="10pt" style:font-weight-asian="bold" style:font-name-complex="Noto Sans Devanagari1" style:font-size-complex="11pt" style:font-weight-complex="bold"/>
    </style:style>
    <style:style style:name="T37" style:family="text">
      <style:text-properties style:font-name="Liberation Serif1" fo:font-size="11pt" style:font-name-asian="Noto Serif CJK SC" style:font-size-asian="10pt" style:font-name-complex="Noto Sans Devanagari1" style:font-size-complex="11pt"/>
    </style:style>
    <style:style style:name="T38" style:family="text">
      <style:text-properties style:font-name="Liberation Serif1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39" style:family="text">
      <style:text-properties style:font-name="Liberation Serif1" fo:font-size="12pt" style:font-name-asian="Noto Serif CJK SC" style:font-size-asian="12pt" style:font-name-complex="Noto Sans Devanagari1" style:font-size-complex="12pt"/>
    </style:style>
    <style:style style:name="T40" style:family="text">
      <style:text-properties style:font-name="Liberation Serif1" fo:font-size="6pt" style:font-name-asian="Noto Serif CJK SC" style:font-size-asian="6pt" style:font-name-complex="Noto Sans Devanagari1" style:font-size-complex="6pt"/>
    </style:style>
    <style:style style:name="T41" style:family="text">
      <style:text-properties fo:font-size="11pt" style:font-size-asian="10pt" style:font-size-complex="11pt"/>
    </style:style>
    <style:style style:name="T42" style:family="text">
      <style:text-properties fo:font-size="13pt" style:font-size-asian="11pt" style:font-size-complex="13pt"/>
    </style:style>
    <style:style style:name="T43" style:family="text">
      <style:text-properties style:font-name="Liberation Serif1" fo:font-size="13pt" style:font-name-asian="Noto Serif CJK SC" style:font-size-asian="11pt" style:font-name-complex="Noto Sans Devanagari1" style:font-size-complex="13pt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fo:font-size="6pt" style:font-size-asian="6pt" style:font-size-complex="6pt"/>
    </style:style>
    <style:style style:name="T46" style:family="text">
      <style:text-properties fo:font-size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7.1327in" fo:padding-top="0.0902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3.8972in" fo:padding-top="0.0902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1.6638in" fo:padding-top="0.0902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0.6244in" fo:padding-top="0.0902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0.6575in" fo:padding-top="0.1098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0.6335in" fo:padding-top="0.0902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3.8882in" fo:padding-top="0.0902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3.102in" fo:padding-top="0.05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2.0508in" fo:padding-top="0.05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solid" draw:stroke-dash="Dot" svg:stroke-width="0.0201in" svg:stroke-color="#b2b2b2" draw:marker-start-width="0.1701in" draw:marker-end-width="0.1701in" svg:stroke-opacity="100%" draw:fill="none" draw:fill-color="#ffffff" fo:min-height="2.6063in" fo:padding-top="0.0299in" fo:padding-bottom="0.0098in" fo:padding-left="0.08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LOGIA School Overview</text:p>
      <text:p text:style-name="P17"/>
      <text:p text:style-name="P17"/>
      <text:p text:style-name="P17"/>
      <text:p text:style-name="P18">Introduction</text:p>
      <text:p text:style-name="P58"/>
      <text:p text:style-name="P57">LOGIA School은 개인의 장기적인 학습을 지원하기 위해 개발된 Personal University 프로젝트이다.</text:p>
      <text:p text:style-name="P57"/>
      <text:p text:style-name="P57">본 문서는 프로젝트의 목적, 설계 철학, 시스템 구조, 데이터 형식 및 향후 개발 방향을 설명하기 위한 공식 개요 문서이다.</text:p>
      <text:p text:style-name="P18"/>
      <text:p text:style-name="P18"/>
      <text:p text:style-name="P18"/>
      <text:p text:style-name="P17">Purpose</text:p>
      <text:p text:style-name="P1"/>
      <text:p text:style-name="P10">LOGIA School은 개인의 평생 학습을 지원하기 위해 설계된 교육 플랫폼이다.</text:p>
      <text:p text:style-name="P46"/>
      <text:p text:style-name="P46">현대에는 수많은 학습 자료가 인터넷에 존재하지만, 장기간에 걸쳐 자신의 학습 과정을 체계적으로 기록하고 관리할 수 있는 환경은 상대적으로 부족하다.</text:p>
      <text:p text:style-name="P46"/>
      <text:p text:style-name="P46">LOGIA School은 이러한 문제를 해결하기 위해 시작되었다.</text:p>
      <text:p text:style-name="P46"/>
      <text:p text:style-name="P46">학습자는 매일의 학습 내용을 기록하고, 학습 자료를 보관하며, 자신의 진도와 학습 이력을 하나의 통합된 시스템에서 관리할 수 있다.</text:p>
      <text:p text:style-name="P46"/>
      <text:p text:style-name="P46">이 프로젝트의 궁극적인 목표는 단순히 지식을 저장하는 것이 아니라, 시간이 지날수록 성장하는 개인의 학문적 자산을 구축하는 데 있다.</text:p>
      <text:p text:style-name="P46"/>
      <text:p text:style-name="P46">LOGIA School은 특정 시험이나 단기 교육을 위한 시스템이 아니라, 수년에서 수십 년에 걸친 학습을 지원하는 <text:span text:style-name="T22">Personal University</text:span>를 지향한다.</text:p>
      <text:p text:style-name="P1"/>
      <text:p text:style-name="P4"/>
      <text:p text:style-name="P4"><text:span text:style-name="T25">Design Goals</text:span></text:p>
      <text:p text:style-name="P46"/>
      <text:p text:style-name="P46">LOGIA School은 다음과 같은 목표를 가진다.</text:p>
      <text:p text:style-name="P46"><text:s/><text:span text:style-name="T7">·</text:span><text:span text:style-name="T24"> 장기적인 학습 기록의 체계적 관리</text:span></text:p>
      <text:p text:style-name="P46"><text:s/><text:span text:style-name="T7">·</text:span><text:span text:style-name="T24"> 과목별 학습 자료의 효율적인 정리</text:span></text:p>
      <text:p text:style-name="P46"><text:s/><text:span text:style-name="T7">·</text:span><text:span text:style-name="T24"> 단순하고 지속 가능한 데이터 저장 방식</text:span></text:p>
      <text:p text:style-name="P46"><text:s/><text:span text:style-name="T7">·</text:span><text:span text:style-name="T24"> 정적 웹 기반의 높은 이식성과 유지보수성</text:span></text:p>
      <text:p text:style-name="P46"><text:s/><text:span text:style-name="T7">·</text:span><text:span text:style-name="T24"> </text:span>Build System을 통한 자동화된 데이터 관리</text:p>
      <text:p text:style-name="P46"><text:s/><text:span text:style-name="T7">·</text:span><text:span text:style-name="T24"> 학습 과정을 시간의 흐름에 따라 시각적으로 기록하는 환경 제공</text:span></text:p>
      <text:p text:style-name="P46"/>
      <text:p text:style-name="P41"/>
      <text:p text:style-name="P41">LOGIA School does not m<text:span text:style-name="T28">e</text:span>rely preserve knowledge. It preserves the process of learning.</text:p>
      <text:p text:style-name="P47">(로기아 스쿨은 단순히 지식을 보존하는 것이 아니라, 배움의 과정을 보존한다.)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oft-page-break/><text:span text:style-name="T29">Definition</text:span></text:p>
      <text:p text:style-name="P1"/>
      <text:p text:style-name="P11">What is LOGIA School?</text:p>
      <text:p text:style-name="P50"/>
      <text:p text:style-name="P50">LOGIA School은 개인의 장기적인 학습을 위해 설계된 정적(Static) 교육 플랫폼이자 학습 관리 시스템(<text:span text:style-name="T22">Personal Learning Management System</text:span>)이다.</text:p>
      <text:p text:style-name="P50"/>
      <text:p text:style-name="P50">과목별 학습 자료, 학습 기록, 진도 정보, 참고 자료를 하나의 통합된 구조로 관리하며, <text:span text:style-name="T22">Build System</text:span>을 통해 학습 데이터를 자동으로 구조화하여 제공한다.</text:p>
      <text:p text:style-name="P50"/>
      <text:p text:style-name="P50">기존의 온라인 교육 플랫폼이 강의 제공을 중심으로 설계되어 있다면, LOGIA School은 <text:span text:style-name="T22">학습자의 지식과 학습 과정을 체계적으로 축적하고 관리하는 것</text:span>을 중심으로 설계되었다.</text:p>
      <text:p text:style-name="P50"/>
      <text:p text:style-name="P50">모든 학습 데이터는 사람이 읽기 쉬운 텍스트 형식으로 작성되며, Build System에 의해 구조화된 데이터로 변환되어 정적 웹 환경에서 효율적으로 <text:s/>활용된다.</text:p>
      <text:p text:style-name="P50"/>
      <text:p text:style-name="P50"/>
      <text:p text:style-name="P11">Core Components</text:p>
      <text:p text:style-name="P11"/>
      <text:p text:style-name="P50">LOGIA School은 크게 네 가지 요소로 구성된다.</text:p>
      <text:p text:style-name="P50"><text:span text:style-name="T3"><text:s/>· Learning Contents</text:span></text:p>
      <text:p text:style-name="P50"><text:span text:style-name="T3"><text:s text:c="3"/>;과목별 학습 자료와 교육 콘텐츠</text:span></text:p>
      <text:p text:style-name="P50"><text:span text:style-name="T3"><text:s/>· LSF (LOGIA Study Format)</text:span></text:p>
      <text:p text:style-name="P50"><text:span text:style-name="T3"><text:s text:c="3"/>;학습 기록을 저장하기 위한 표준 데이터 형식</text:span></text:p>
      <text:p text:style-name="P50"><text:span text:style-name="T3"><text:s/>· Build System</text:span></text:p>
      <text:p text:style-name="P50"><text:span text:style-name="T3"><text:s text:c="3"/>;학습 데이터를 분석하고 구조화하는 데이터 엔진</text:span></text:p>
      <text:p text:style-name="P50"><text:span text:style-name="T3"><text:s/>· Study Board</text:span></text:p>
      <text:p text:style-name="P50"><text:span text:style-name="T3"><text:s text:c="3"/>;학습 기록과 진도를 시각적으로 관리하는 사용자 인터페이스</text:span></text:p>
      <text:p text:style-name="P50"/>
      <text:p text:style-name="P50"/>
      <text:p text:style-name="P11"><text:span text:style-name="T26">Characteristics</text:span></text:p>
      <text:p text:style-name="P11"/>
      <text:p text:style-name="P51">LOGIA School은 다음과 같은 특징을 가진다.</text:p>
      <text:p text:style-name="P51"><text:s/><text:span text:style-name="T8">· 정적 웹 기반의 교육 플랫폼</text:span></text:p>
      <text:p text:style-name="P51"><text:span text:style-name="T8"><text:s/>· 장기 학습을 위한 데이터 중심 구조</text:span></text:p>
      <text:p text:style-name="P51"><text:span text:style-name="T8"><text:s/>· 과목별 독립적인 학습 공간</text:span></text:p>
      <text:p text:style-name="P51"><text:span text:style-name="T8"><text:s/>· </text:span><text:span text:style-name="T3">Build System을 통한 자동 데이터 생성</text:span></text:p>
      <text:p text:style-name="P51"><text:span text:style-name="T3"><text:s/></text:span><text:span text:style-name="T8">· 플랫폼에 종속되지 않는 텍스트 기반 저장 방식</text:span></text:p>
      <text:p text:style-name="P51"><text:span text:style-name="T8"><text:s/>· 확장 가능한 모듈형 구조</text:span></text:p>
      <text:p text:style-name="P51"><text:span text:style-name="T8"/></text:p>
      <text:p text:style-name="P51"><text:span text:style-name="T8"/></text:p>
      <text:p text:style-name="P12"><text:span text:style-name="T3">Concept</text:span></text:p>
      <text:p text:style-name="P12"><text:span text:style-name="T3"/></text:p>
      <text:p text:style-name="P51"><text:span text:style-name="T3">LOGIA School은 일반적인 의미의 학교(School)가 아니라, </text:span><text:span text:style-name="T9">개인의 지식과 학습 과정을 체계적으로 축적하는 디지털 학습 환경</text:span><text:span text:style-name="T3">이다.</text:span></text:p>
      <text:p text:style-name="P1">학습기록, 교육 자료, 독서, 프로젝트를 하나의 구조 안에서 연결하여 시간이 지날수록 성장하는 개인의 학문적 자산을 구축하는 것을 목표로 한다.</text:p>
      <text:p text:style-name="P1"/>
      <text:p text:style-name="P1"/>
      <text:p text:style-name="P42">LOGIA School is a Personal University designed for lifelong learning.</text:p>
      <text:p text:style-name="P1"><text:soft-page-break/><text:span text:style-name="T29">Site Structure</text:span></text:p>
      <text:p text:style-name="P1"/>
      <text:p text:style-name="P54">LOGIA School adopts a modular directory structure designed for salability and maintainability.</text:p>
      <text:p text:style-name="P54"/>
      <text:p text:style-name="P54">Each academic subject is organized as an independent module with an identical internal structure. This consistency allows new subjects to be added without changing the overall architecture of the website.</text:p>
      <text:p text:style-name="P54"/>
      <text:p text:style-name="P54">The project separates presentation, study records, media resources, and build tools into dedicated directories, making the system easier to maintain and extend over time.</text:p>
      <text:p text:style-name="P54"/>
      <text:p text:style-name="P54"/>
      <text:p text:style-name="P54"><text:span text:style-name="T22">Directory Overview</text:span></text:p>
      <text:p text:style-name="P54"/>
      <text:p text:style-name="P54">Tree</text:p>
      <text:p text:style-name="P54"><draw:frame text:anchor-type="paragraph" draw:z-index="9" draw:name="Text Frame 10" draw:style-name="gr1" draw:text-style-name="P60" svg:width="6.4724in" svg:height="7.2331in" svg:x="-0.0354in" svg:y="0.1035in"><draw:text-box><text:p><text:span text:style-name="T36">LOGIA School</text:span></text:p><text:p><text:span text:style-name="T37"/></text:p><text:p><text:span text:style-name="T37">├── </text:span><text:span text:style-name="T37">assets/ <text:s text:c="11"/>Shared CSS &amp; JavaScript</text:span></text:p><text:p><text:span text:style-name="T37">├── </text:span><text:span text:style-name="T37">images/ <text:s text:c="11"/>Shared Images</text:span></text:p><text:p><text:span text:style-name="T37">├── </text:span><text:span text:style-name="T37">subjects/ <text:s text:c="9"/>Academic Subjects</text:span></text:p><text:p><text:span text:style-name="T37">│ <text:s text:c="2"/>├── </text:span><text:span text:style-name="T37">calculus/</text:span></text:p><text:p><text:span text:style-name="T37">│ <text:s text:c="2"/>│ <text:s text:c="2"/>├── </text:span><text:span text:style-name="T37">media/</text:span></text:p><text:p><text:span text:style-name="T37">│ <text:s text:c="2"/>│ <text:s text:c="2"/>├── </text:span><text:span text:style-name="T37">records/</text:span></text:p><text:p><text:span text:style-name="T37">│ <text:s text:c="2"/>│ <text:s text:c="2"/>├── </text:span><text:span text:style-name="T37">calculus.html</text:span></text:p><text:p><text:span text:style-name="T37">│ <text:s text:c="2"/>│ <text:s text:c="2"/>├── </text:span><text:span text:style-name="T37">calculus-board.html</text:span></text:p><text:p><text:span text:style-name="T37">│ <text:s text:c="2"/>│ <text:s text:c="2"/>├── </text:span><text:span text:style-name="T37">calculus-index.json</text:span></text:p><text:p><text:span text:style-name="T37">│ <text:s text:c="2"/>│ <text:s text:c="2"/>└── </text:span><text:span text:style-name="T37">calculus-chapters.txt</text:span></text:p><text:p><text:span text:style-name="T37">│ <text:s text:c="2"/>│</text:span></text:p><text:p><text:span text:style-name="T37">│ <text:s text:c="2"/>├── </text:span><text:span text:style-name="T37">chemistry/</text:span></text:p><text:p><text:span text:style-name="T37">│ <text:s text:c="2"/>├── </text:span><text:span text:style-name="T37">biology/</text:span></text:p><text:p><text:span text:style-name="T37">│ <text:s text:c="2"/>└── </text:span><text:span text:style-name="T37">...</text:span></text:p><text:p><text:span text:style-name="T37">│</text:span></text:p><text:p><text:span text:style-name="T37">├── </text:span><text:span text:style-name="T37">reading/ <text:s text:c="10"/>Reading Library</text:span></text:p><text:p><text:span text:style-name="T37">├── </text:span><text:span text:style-name="T37">resources/ <text:s text:c="8"/>Reference Materials</text:span></text:p><text:p><text:span text:style-name="T37">├── </text:span><text:span text:style-name="T37">projects/ <text:s text:c="9"/>Research Projects</text:span></text:p><text:p><text:span text:style-name="T37">│</text:span></text:p><text:p><text:span text:style-name="T37">├── </text:span><text:span text:style-name="T37">logiabuild.py <text:s text:c="5"/>Build System</text:span></text:p><text:p><text:span text:style-name="T37">└── </text:span><text:span text:style-name="T37">index.html <text:s text:c="8"/>Home Page</text:span></text:p><text:p><text:span text:style-name="T37"/></text:p><text:p><text:span text:style-name="T37"/></text:p><text:p><text:span text:style-name="T38">Directory</text:span></text:p><text:p><text:span text:style-name="T38"/></text:p><text:p><text:span text:style-name="T39">/subjects</text:span><text:span text:style-name="T39"><text:tab/></text:span><text:span text:style-name="T39"><text:tab/></text:span><text:span text:style-name="T39">;Academic subjects and study boards</text:span></text:p><text:p><text:span text:style-name="T40"/></text:p><text:p><text:span text:style-name="T39">/reading</text:span><text:span text:style-name="T39"><text:tab/></text:span><text:span text:style-name="T39"><text:tab/></text:span><text:span text:style-name="T39">;Reading library</text:span></text:p><text:p><text:span text:style-name="T40"/></text:p><text:p><text:span text:style-name="T39">/resources</text:span><text:span text:style-name="T39"><text:tab/></text:span><text:span text:style-name="T39"><text:tab/></text:span><text:span text:style-name="T39">;Reference materials and notes</text:span></text:p><text:p><text:span text:style-name="T40"/></text:p><text:p><text:span text:style-name="T39">/projects</text:span><text:span text:style-name="T39"><text:tab/></text:span><text:span text:style-name="T39"><text:tab/></text:span><text:span text:style-name="T39">;Long-term research projects</text:span></text:p><text:p><text:span text:style-name="T40"/></text:p><text:p><text:span text:style-name="T39">/assets</text:span><text:span text:style-name="T39"><text:tab/></text:span><text:span text:style-name="T39"><text:tab/></text:span><text:span text:style-name="T39"><text:tab/></text:span><text:span text:style-name="T39"><text:tab/></text:span><text:span text:style-name="T39">;Shared CSS and JavaScript</text:span></text:p><text:p><text:span text:style-name="T40"/></text:p><text:p><text:span text:style-name="T39">/images</text:span><text:span text:style-name="T39"><text:tab/></text:span><text:span text:style-name="T39"><text:tab/></text:span><text:span text:style-name="T39">;Shared images</text:span></text:p><text:p><text:span text:style-name="T40"/></text:p><text:p><text:span text:style-name="T39">logiabuild.py</text:span><text:span text:style-name="T39"><text:tab/></text:span><text:span text:style-name="T39"><text:tab/></text:span><text:span text:style-name="T39">;LOGIA Build System</text:span></text:p><text:p><text:span text:style-name="T40"/></text:p><text:p><text:span text:style-name="T39">index.html</text:span><text:span text:style-name="T39"><text:tab/></text:span><text:span text:style-name="T39"><text:tab/></text:span><text:span text:style-name="T39">;Main entry point</text:span></text:p><text:p><text:span text:style-name="T40"/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5"><text:soft-page-break/><text:span text:style-name="T22">Design Principles</text:span></text:p>
      <text:p text:style-name="P55"/>
      <text:p text:style-name="P55">The directory structure follows several design principles.</text:p>
      <text:p text:style-name="P55"><text:s/><text:span text:style-name="T3">· Modular organization</text:span></text:p>
      <text:p text:style-name="P55"><text:span text:style-name="T3"><text:s/>· Consistent subject layout</text:span></text:p>
      <text:p text:style-name="P55"><text:span text:style-name="T3"><text:s/>· Separation of data and presentation</text:span></text:p>
      <text:p text:style-name="P55"><text:span text:style-name="T3"><text:s/>· Shared resources</text:span></text:p>
      <text:p text:style-name="P55"><text:span text:style-name="T3"><text:s/>· Easy scalability</text:span></text:p>
      <text:p text:style-name="P55"><text:span text:style-name="T3"><text:s/>· Simple maintenance</text:span></text:p>
      <text:p text:style-name="P55"><text:span text:style-name="T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29">Philosophy</text:span></text:p>
      <text:p text:style-name="P3"/>
      <text:p text:style-name="P13">Educational Philosophy</text:p>
      <text:p text:style-name="P3"/>
      <text:p text:style-name="P52">LOGIA School은 지식을 많이 전달하는 것보다 <text:span text:style-name="T22">깊이 이해하고 꾸준히 축적하는 것</text:span>을 더 중요하게 생각한다.</text:p>
      <text:p text:style-name="P52"/>
      <text:p text:style-name="P52">학습은 단기간에 많은 내용들을 습득하는 과정이 아니라, 오랜 시간 동안 이해를 넓혀 가며 자신의 지식 체계를 만들어 가는 과정이다.</text:p>
      <text:p text:style-name="P52"/>
      <text:p text:style-name="P52">따라서 LOGIA School은 시험이나 성적을 목표로 하는 교육보다, 평생에 걸쳐 지속되는 자기 주도 학습(<text:span text:style-name="T22">Self-directed Learning</text:span>)을 지향한다.</text:p>
      <text:p text:style-name="P52"/>
      <text:p text:style-name="P52"/>
      <text:p text:style-name="P13">Learning as a Process</text:p>
      <text:p text:style-name="P13"/>
      <text:p text:style-name="P52">LOGIA School은 결과보다 <text:span text:style-name="T22">과정(Process)</text:span>을 중요하게 생각한다.</text:p>
      <text:p text:style-name="P52">하루의 학습 기록은 작은 단위일 수 있지만, 이러한 기록들이 쌓이면 결국 한 사람의 학문적 성장 과정을 보여 주는 역사(History)가 된다.</text:p>
      <text:p text:style-name="P52">학습은 단절된 사건이 아니라, 매일 이어지는 연속적인 과정이다.</text:p>
      <text:p text:style-name="P52"/>
      <text:p text:style-name="P52"/>
      <text:p text:style-name="P13">Understanding over Memorization</text:p>
      <text:p text:style-name="P13"/>
      <text:p text:style-name="P52">LOGIA School은 단순한 암기보다 이해를 우선한다.</text:p>
      <text:p text:style-name="P52">지식을 외우는 것은 학습의 출발점일 수 있지만, 개념을 이해하고 서로 연결할 때 비로소 자신의 지식으로 자리 잡는다.</text:p>
      <text:p text:style-name="P52">따라서 학습 기록 역시 정답을 나열하기보다, 자신이 이해한 내용과 사고 과정을 남기는 것을 권장한다.</text:p>
      <text:p text:style-name="P52"/>
      <text:p text:style-name="P52"/>
      <text:p text:style-name="P13">Simplicity</text:p>
      <text:p text:style-name="P13"/>
      <text:p text:style-name="P52">좋은 시스템은 복잡한 사용법이 아니라 단순한 사용 경험에서 시작된다고 생각한다.</text:p>
      <text:p text:style-name="P52">학습자는 텍스트 파일만 작성하면 되고, 반복적인 데이터 처리와 관리 작업은 Build System이 담당한다.</text:p>
      <text:p text:style-name="P52">사용자는 학습에 집중하고, 시스템은 관리에 집중하는 것이 LOGIA School의 기본 원칙이다.</text:p>
      <text:p text:style-name="P52"/>
      <text:p text:style-name="P52"/>
      <text:p text:style-name="P13"><text:span text:style-name="T27">Openness</text:span></text:p>
      <text:p text:style-name="P13"/>
      <text:p text:style-name="P52">학습 기록은 특정 프로그램이나 데이터베이스에 종속되지 않아야 한다.</text:p>
      <text:p text:style-name="P52">그래서 <text:span text:style-name="T27">LOGIA School은 사람이 직접 읽을 수 있는 텍스트 기반 형식을 채택하였다.</text:span></text:p>
      <text:p text:style-name="P52">사용자는 언제든 자신의 학습 기록을 다른 환경으로 옮길 수 있으며, 데이터는 특정 소프트웨어에 종속되지 <text:s/>않는다.</text:p>
      <text:p text:style-name="P52"/>
      <text:p text:style-name="P52"/>
      <text:p text:style-name="P13"><text:span text:style-name="T27">Lifelong Learning</text:span></text:p>
      <text:p text:style-name="P13"/>
      <text:p text:style-name="P53">LOGIA School은 몇 주 또는 몇 달을 위한 프로젝트가 아니다.</text:p>
      <text:p text:style-name="P53">한 사람의 학습은 평생 이어질 수 있으며, 수십 년 동안 축적된 기록은 그 자체로 하나의 지식 자산이 된다.</text:p>
      <text:p text:style-name="P53">LOGIA School은 이러한 장기적인 성장을 지원하는 <text:span text:style-name="T22">Personal University</text:span>를 목표로 한다.</text:p>
      <text:p text:style-name="P52"><text:soft-page-break/><text:span text:style-name="T23">Core Principles</text:span></text:p>
      <text:p text:style-name="P52"><text:span text:style-name="T23"/></text:p>
      <text:p text:style-name="P53">LOGIA School은 다음과 같은 원칙을 바탕으로 설계되었다.</text:p>
      <text:p text:style-name="P53"><text:s/><text:span text:style-name="T8">· 깊이 이해를 추구한다.</text:span></text:p>
      <text:p text:style-name="P53"><text:span text:style-name="T8"><text:s/>· 과정을 기록한다.</text:span></text:p>
      <text:p text:style-name="P53"><text:span text:style-name="T8"><text:s/>· 학습을 꾸준히 이어 간다.</text:span></text:p>
      <text:p text:style-name="P53"><text:span text:style-name="T8"><text:s/>· 데이터를 단순하게 관리한다.</text:span></text:p>
      <text:p text:style-name="P53"><text:span text:style-name="T8"><text:s/>· 자동화를 통해 학습에 집중한다.</text:span></text:p>
      <text:p text:style-name="P53"><text:span text:style-name="T8"><text:s/>· 지식을 평생 축적한다.</text:span></text:p>
      <text:p text:style-name="P53"/>
      <text:p text:style-name="P53"><text:span text:style-name="T8"/></text:p>
      <text:p text:style-name="P53"><text:span text:style-name="T32">LOGIA School believes that education is not the accumulation of information, but the cultivation of understa</text:span><text:span text:style-name="T33">n</text:span><text:span text:style-name="T32">ding.</text:span></text:p>
      <text:p text:style-name="P48">(로기아 스쿨은 교육이란 정보를 축적하는 일이 아니라, 이해를 길러 가는 과정이라고 믿는다.)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oft-page-break/><text:span text:style-name="T29">LSF (LOGIA Study Format)</text:span></text:p>
      <text:p text:style-name="P1"/>
      <text:p text:style-name="P5">LOGIA Study File S<text:span text:style-name="T35">pe</text:span>cification v1.0</text:p>
      <text:p text:style-name="P25"/>
      <text:p text:style-name="P59">LSF(LOGIA Study Format)는 LOGIA School에서 사용하는 학습 데이터 저장 형식이다.</text:p>
      <text:p text:style-name="Text_20_body">교육 사이트의 특성상 <text:span text:style-name="Strong_20_Emphasis">학습 기록을 가능한 한 쉽고 직관적으로 작성하는 것</text:span>과 <text:span text:style-name="Strong_20_Emphasis">컴퓨터가 데이터를 안정적으로 처리할 수 있도록 구조화하는 것</text:span>을 최우선 목표로 설계하였다.</text:p>
      <text:p text:style-name="Text_20_body">사용자는 매일의 학습 내용을 단순한 <text:span text:style-name="Strong_20_Emphasis">TXT 파일</text:span> 형태로 작성하며, Build System은 이를 자동으로 분석하여 JSON 데이터베이스를 생성한다. 이 방식을 통해 데이터베이스를 직접 관리하지 않고도 정적(Static) 홈페이지에서 학습 기록을 효율적으로 활용할 수 있다</text:p>
      <text:p text:style-name="P4"/>
      <text:p text:style-name="P4"><text:span text:style-name="T1">Daily Study Record</text:span></text:p>
      <text:p text:style-name="P4"/>
      <text:p text:style-name="P26">하루의 학습 내용은 하나의 txt 파일로 저장된다.</text:p>
      <text:p text:style-name="P1"><draw:frame text:anchor-type="paragraph" draw:z-index="0" draw:name="Text Frame 1" draw:style-name="gr10" draw:text-style-name="P60" svg:width="6.4634in" svg:height="2.6461in" svg:x="-0.052in" svg:y="0.1165in"><draw:text-box><text:p><text:span text:style-name="T41">memo:</text:span></text:p><text:p><text:span text:style-name="T41">오늘 학습한 내용의 중요 메모를 적습니다</text:span><text:span text:style-name="T41">.</text:span></text:p><text:p><text:span text:style-name="T46"/></text:p><text:p><text:span text:style-name="T41">progress:</text:span></text:p><text:p><text:span text:style-name="T41">3.7/13</text:span></text:p><text:p><text:span text:style-name="T46"/></text:p><text:p><text:span text:style-name="T41">studytime:</text:span></text:p><text:p><text:span text:style-name="T41">2h 30m</text:span></text:p><text:p><text:span text:style-name="T46"/></text:p><text:p><text:span text:style-name="T41">files:</text:span></text:p><text:p><text:span text:style-name="T41">calculus_2026-06-30-01.jpg | </text:span><text:span text:style-name="T41">미적분학 교재 설명</text:span></text:p><text:p><text:span text:style-name="T41">calculus_2026-06-30-02.pdf | 3.7 </text:span><text:span text:style-name="T41">내용 요약</text:span></text:p><text:p><text:span text:style-name="T41">calculus_2026-06-30-03.odt | </text:span><text:span text:style-name="T41">함수 정리 자료 요약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><text:span text:style-name="T11"/></text:p>
      <text:p text:style-name="P22"><text:span text:style-name="T11">·</text:span><text:span text:style-name="T14"> </text:span>memo; 학습 메모</text:p>
      <text:p text:style-name="P23"><text:span text:style-name="T11">·</text:span><text:span text:style-name="T14"> </text:span>progress; 현재 학습한 단원 위치(예: 13개 단원 중 3.7단원)</text:p>
      <text:p text:style-name="P23"><text:span text:style-name="T11">·</text:span><text:span text:style-name="T14"> </text:span>studytime; 총 학습 시간</text:p>
      <text:p text:style-name="P23"><text:span text:style-name="T11">·</text:span><text:span text:style-name="T14"> </text:span>files; 학습자료 목록 및 설명</text:p>
      <text:p text:style-name="P1"/>
      <text:p text:style-name="P1"/>
      <text:p text:style-name="P4"><text:span text:style-name="T1">Subject Chapter Index</text:span></text:p>
      <text:p text:style-name="P25"/>
      <text:p text:style-name="P25">각과목은 별도의 Chapter Index를 가진다.</text:p>
      <text:p text:style-name="P25">예를 들어 미적분학은 다음과 같이 구성된다.</text:p>
      <text:p text:style-name="P1"><draw:frame text:anchor-type="paragraph" draw:z-index="1" draw:name="Text Frame 2" draw:style-name="gr9" draw:text-style-name="P60" svg:width="6.4634in" svg:height="2.1106in" svg:x="-0.0457in" svg:y="0.1028in"><draw:text-box><text:p><text:span text:style-name="T41">1 </text:span><text:span text:style-name="T41">함수와 극한</text:span></text:p><text:p><text:span text:style-name="T41">1.1 </text:span><text:span text:style-name="T41">함수와 그 표현</text:span></text:p><text:p><text:span text:style-name="T41">1.2 </text:span><text:span text:style-name="T41">필수적인 함수 목록</text:span></text:p><text:p><text:span text:style-name="T44"/></text:p><text:p><text:span text:style-name="T41">2 </text:span><text:span text:style-name="T41">도함수</text:span></text:p><text:p><text:span text:style-name="T41">2.1 </text:span><text:span text:style-name="T41">미분 계수와 변화율</text:span></text:p><text:p><text:span text:style-name="T41">2.2 </text:span><text:span text:style-name="T41">도함수</text:span></text:p><text:p><text:span text:style-name="T45"><text:tab/></text:span></text:p><text:p><text:span text:style-name="T41">···</text:span></text:p><text:p><text:span text:style-name="T45"><text:tab/></text:span></text:p><text:p><text:span text:style-name="T41">13 </text:span><text:span text:style-name="T41">벡터 해석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생명과학처럼 교재의 단원 구성 방식이 다른 경우에는 다음과 같은 구조를 사용한다.</text:p>
      <text:p text:style-name="P1"><draw:frame text:anchor-type="paragraph" draw:z-index="2" draw:name="Text Frame 3" draw:style-name="gr8" draw:text-style-name="P62" svg:width="6.4724in" svg:height="3.1622in" svg:x="-0.0354in" svg:y="0.1307in"><draw:text-box><text:p text:style-name="P61"><text:span text:style-name="T41">1 </text:span><text:span text:style-name="T41">생물학과 그 주제들</text:span></text:p><text:p text:style-name="P61"><text:span text:style-name="T41">1.1 </text:span><text:span text:style-name="T41">생명을 연구하면 통일된 주제가 드러난다 </text:span></text:p><text:p text:style-name="P61"><text:span text:style-name="T41">1.2 </text:span><text:span text:style-name="T41">중심주제</text:span><text:span text:style-name="T41">: </text:span><text:span text:style-name="T41">진화는 생명의 통일성과 다양성을 설명한다</text:span><text:span text:style-name="T41">.</text:span></text:p><text:p text:style-name="P61"><text:span text:style-name="T41"/></text:p><text:p text:style-name="P61"><text:span text:style-name="T41">1</text:span><text:span text:style-name="T41">단원 생물학에서 화학의 역할</text:span></text:p><text:p text:style-name="P61"><text:span text:style-name="T41"/></text:p><text:p text:style-name="P61"><text:span text:style-name="T41">2 </text:span><text:span text:style-name="T41">원자와 분자</text:span></text:p><text:p text:style-name="P61"><text:span text:style-name="T41">2.1 </text:span><text:span text:style-name="T41">물질은 순수한 형태와 화합물</text:span><text:span text:style-name="T41">... </text:span></text:p><text:p text:style-name="P61"><text:span text:style-name="T41">2.2 </text:span><text:span text:style-name="T41">원소의 성질은</text:span><text:span text:style-name="T41">...</text:span></text:p><text:p text:style-name="P61"><text:span text:style-name="T41"/></text:p><text:p text:style-name="P61"><text:span text:style-name="T41">…</text:span></text:p><text:p text:style-name="P61"><text:span text:style-name="T41"/></text:p><text:p text:style-name="P61"><text:span text:style-name="T41">51 </text:span><text:span text:style-name="T41">﻿﻿﻿</text:span><text:span text:style-name="T41">생태학의 개요</text:span></text:p><text:p text:style-name="P61"><text:span text:style-name="T41">52 </text:span><text:span text:style-name="T41">﻿﻿﻿</text:span><text:span text:style-name="T41">행동생태학 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현재 <text:span text:style-name="T2">LSF는 이러한 두 가지 Chapter Index 형식을 지원한다.</text:span></text:p>
      <text:p text:style-name="P20"/>
      <text:p text:style-name="P20"/>
      <text:p text:style-name="P14"><text:span text:style-name="T2">Design Philosophy</text:span></text:p>
      <text:p text:style-name="P14"/>
      <text:p text:style-name="P25">LSF는 다음과 같은 설계 원칙을 따른다.</text:p>
      <text:p text:style-name="P27"><text:span text:style-name="T3">- 사람이 쉽게 읽고 작성할 수 있는 형식일 것</text:span></text:p>
      <text:p text:style-name="P27"><text:span text:style-name="T3">- 컴퓨터가 자동으로 파싱할 수 있는 형식일 것</text:span></text:p>
      <text:p text:style-name="P27"><text:span text:style-name="T3">- Build </text:span><text:span text:style-name="T11">sys</text:span><text:span text:style-name="T3">tem이 자동으로 JSON 데이터를 생성할 수 있을 것</text:span></text:p>
      <text:p text:style-name="P27"><text:span text:style-name="T3">- 별도의 데이터베이스 없이 정적 홈페이지에서도 활용 가능할 것</text:span></text:p>
      <text:p text:style-name="P27"><text:span text:style-name="T3">- 운영체제와 프로그램에 관계없이 사용할 수 있는 TXT 기반일 것</text:span></text:p>
      <text:p text:style-name="P27"><text:span text:style-name="T3">- 새로운 과목이나 교재 구조를 쉽게 추가할 수 있도록 확장성을 고려할 것</text:span></text:p>
      <text:p text:style-name="P19"/>
      <text:p text:style-name="P19"/>
      <text:p text:style-name="P14"><text:span text:style-name="T15">Advantage</text:span></text:p>
      <text:p text:style-name="P14"/>
      <text:p text:style-name="P27">LSF는 다음과 같은 장점을 가진다.</text:p>
      <text:p text:style-name="P27">- Simple; 일반 텍스트만으로 학습 기록을 작성할 수 있다.</text:p>
      <text:p text:style-name="P27">- Portable; 어떤 운영체제에서도 동일한 파일을 사용할 수 있다.</text:p>
      <text:p text:style-name="P27">- Build-Friendly; Build System이 자동으로 JSON 데이터 베이스를 생성한다.</text:p>
      <text:p text:style-name="P27">- Static Web Compatible; 별도의 서버나 데이터베이스 없이 정적 홈페이지에서도 학습 기록을 관리할 수 있다.</text:p>
      <text:p text:style-name="P27">- Extensible; 새로운 교재 구조나 저장 형식을 쉽게 추가할 수 있다.</text:p>
      <text:p text:style-name="P21"/>
      <text:p text:style-name="P21"/>
      <text:p text:style-name="P6">future</text:p>
      <text:p text:style-name="P28">LSF는 현재 version 1.0을 기반으로 하고 있으며, 향후 새로운 Chapter Index 형식이나 메타데이터 등을 지원하도록 지속적으로 확장될 예정이다.</text:p>
      <text:p text:style-name="P28"/>
      <text:p text:style-name="P28"/>
      <text:p text:style-name="P6">LSF is designed so that humans write naturally, while computers organize automatically.</text:p>
      <text:p text:style-name="P1"><text:soft-page-break/><text:span text:style-name="T29">Build System</text:span></text:p>
      <text:p text:style-name="P1"/>
      <text:p text:style-name="P15">LOGIA Build System </text:p>
      <text:p text:style-name="P29"/>
      <text:p text:style-name="P29">LOGIA Build System은 LOGIA School의 모든 학습 데이터를 자동으로 처리하는 핵심 시스템이다.</text:p>
      <text:p text:style-name="P29"/>
      <text:p text:style-name="P29">학습자가 작성한 TXT 파일과 과목 정보를 분석하여 홈페이지에서 사용할 수 있는 JSON 데이터를 생성하며, 학습 자료의 일관성과 무결성을 함께 검사한다.</text:p>
      <text:p text:style-name="P29"/>
      <text:p text:style-name="P29">사용자는 학습 내용만 작성하면 되고, Build System이 홈페이지 운영에 필요한 모든 데이터를 자동으로 준비한다.</text:p>
      <text:p text:style-name="P29"/>
      <text:p text:style-name="P29"/>
      <text:p text:style-name="P15">workflow</text:p>
      <text:p text:style-name="P29"/>
      <text:p text:style-name="P29">LOGIA Build System은 다음과 같은 순서로 동작한다.</text:p>
      <text:p text:style-name="P29"><draw:frame text:anchor-type="paragraph" draw:z-index="3" draw:name="Text Frame 4" draw:style-name="gr7" draw:text-style-name="P60" svg:width="6.4724in" svg:height="3.9886in" svg:x="-0.0354in" svg:y="0.1035in"><draw:text-box><text:p><text:span text:style-name="T41">TXT Study Records</text:span></text:p><text:p><text:span text:style-name="T41"/></text:p><text:p><text:span text:style-name="T41"><text:tab/></text:span><text:span text:style-name="T41">↓</text:span></text:p><text:p><text:span text:style-name="T41"/></text:p><text:p><text:span text:style-name="T41">Chapter Index</text:span></text:p><text:p><text:span text:style-name="T37"/></text:p><text:p><text:span text:style-name="T37"><text:tab/></text:span><text:span text:style-name="T37">↓</text:span></text:p><text:p><text:span text:style-name="T37"/></text:p><text:p><text:span text:style-name="T37">Media Files</text:span></text:p><text:p><text:span text:style-name="T37"/></text:p><text:p><text:span text:style-name="T37"><text:tab/></text:span><text:span text:style-name="T37">↓</text:span></text:p><text:p><text:span text:style-name="T37"/></text:p><text:p><text:span text:style-name="T37">logiabuild.py</text:span></text:p><text:p><text:span text:style-name="T37"/></text:p><text:p><text:span text:style-name="T37"><text:tab/></text:span><text:span text:style-name="T37">↓</text:span></text:p><text:p><text:span text:style-name="T37"/></text:p><text:p><text:span text:style-name="T37">JSON Database</text:span></text:p><text:p><text:span text:style-name="T37"/></text:p><text:p><text:span text:style-name="T37"><text:tab/></text:span><text:span text:style-name="T37"><text:tab/></text:span><text:span text:style-name="T37">↓</text:span></text:p><text:p><text:span text:style-name="T37"/></text:p><text:p><text:span text:style-name="T37">Study Board</text:span>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"/>
      <text:p text:style-name="P1"/>
      <text:p text:style-name="P4"><text:span text:style-name="T16">Main Responsibilities</text:span></text:p>
      <text:p text:style-name="P30"/>
      <text:p text:style-name="P30">Build System은 다음과 같은 작업을 수행한다.</text:p>
      <text:p text:style-name="P1"/>
      <text:p text:style-name="P30">1. Study Record Parsing</text:p>
      <text:p text:style-name="P30">학습자가 작성한 TXT 파일을 읽어 다음 정보를 추출한다.</text:p>
      <text:p text:style-name="P30"><text:span text:style-name="T3">·</text:span><text:span text:style-name="T12"> Memo</text:span></text:p>
      <text:p text:style-name="P30"><text:span text:style-name="T3">· Progress</text:span></text:p>
      <text:p text:style-name="P30"><text:span text:style-name="T3">· Study Time</text:span></text:p>
      <text:p text:style-name="P30"><text:span text:style-name="T3">· Attached Files</text:span></text:p>
      <text:p text:style-name="P30"><text:span text:style-name="T3"/></text:p>
      <text:p text:style-name="P30"><text:soft-page-break/><text:span text:style-name="T3">2. JSON Database Generation</text:span></text:p>
      <text:p text:style-name="P30"><text:span text:style-name="T3"><text:s/>모든 학습 기록을 분석하여 과목별 JSON 데이터베이스를 생성한다.</text:span></text:p>
      <text:p text:style-name="P30"><text:s/>예를들어</text:p>
      <text:p text:style-name="P30"/>
      <text:p text:style-name="P30"><draw:frame text:anchor-type="paragraph" draw:z-index="4" draw:name="Text Frame 5" draw:style-name="gr6" draw:text-style-name="P60" svg:width="6.4815in" svg:height="0.7335in" svg:x="-0.0354in" svg:y="0.1035in"><draw:text-box><text:p><text:span text:style-name="T41"/></text:p><text:p><text:span text:style-name="T42">subjects/calculus/ </text:span><text:span text:style-name="T42"><text:tab/></text:span><text:span text:style-name="T43">→</text:span><text:span text:style-name="T43"><text:tab/></text:span><text:span text:style-name="T43">calculus-index.json</text:span></text:p><text:p><text:span text:style-name="T37"/></text:p></draw:text-box></draw:frame></text:p>
      <text:p text:style-name="P1"/>
      <text:p text:style-name="P1"/>
      <text:p text:style-name="P1"/>
      <text:p text:style-name="P1"><text:span text:style-name="T17"/></text:p>
      <text:p text:style-name="P1"><text:span text:style-name="T17">이렇게 자동 생성된다.</text:span></text:p>
      <text:p text:style-name="P32">Study Board는 이 JSON 파일만 읽으면 모든 학습 정보를 표시할 수 있다.</text:p>
      <text:p text:style-name="P32"/>
      <text:p text:style-name="P32">3. Progress Calculation</text:p>
      <text:p text:style-name="P36"><text:span text:style-name="T18">Build System은 </text:span><text:span text:style-name="T19">3.7 / 13 </text:span><text:span text:style-name="T18">과 같은 Progress 정보를 이용하여</text:span></text:p>
      <text:p text:style-name="P36"><text:span text:style-name="T5">· 전체 진도율</text:span></text:p>
      <text:p text:style-name="P36"><text:span text:style-name="T5">· 현재 학습 위치</text:span></text:p>
      <text:p text:style-name="P36"><text:span text:style-name="T5">· 최근 학습일</text:span></text:p>
      <text:p text:style-name="P36"><text:span text:style-name="T5">· 총 학습일</text:span></text:p>
      <text:p text:style-name="P36">등을 자동 계산한다.</text:p>
      <text:p text:style-name="P36"/>
      <text:p text:style-name="P37">4. File Validation</text:p>
      <text:p text:style-name="P37"><text:s/>모든 첨부 파일을 검사한다.</text:p>
      <text:p text:style-name="P37"/>
      <text:p text:style-name="P37"><text:s/>예를 들어</text:p>
      <text:p text:style-name="P37"><draw:frame text:anchor-type="paragraph" draw:z-index="5" draw:name="Text Frame 6" draw:style-name="gr5" draw:text-style-name="P60" svg:width="6.4724in" svg:height="0.7776in" svg:x="-0.0354in" svg:y="0.1035in"><draw:text-box><text:p><text:span text:style-name="T41">Files:</text:span><text:span text:style-name="T41"><text:line-break/></text:span><text:span text:style-name="T41"><text:line-break/></text:span><text:span text:style-name="T41">calculus_2026-06-30-01.jpg</text:span></text:p></draw:text-box></draw:frame></text:p>
      <text:p text:style-name="P32"/>
      <text:p text:style-name="P32"/>
      <text:p text:style-name="P32"/>
      <text:p text:style-name="P32"/>
      <text:p text:style-name="P33">가 기록되어 있는데 실제 파일이 존재하지 않으면 Warning을 출력한다.</text:p>
      <text:p text:style-name="P33"/>
      <text:p text:style-name="P33">반대로 Media 폴더에 존재하지만 사용되지 않는 파일도 찾아낼 수 있다.</text:p>
      <text:p text:style-name="P33">예)</text:p>
      <text:p text:style-name="P33"><draw:frame text:anchor-type="paragraph" draw:z-index="6" draw:name="Text Frame 7" draw:style-name="gr4" draw:text-style-name="P60" svg:width="6.4724in" svg:height="0.7248in" svg:x="-0.0354in" svg:y="0.1035in"><draw:text-box><text:p><text:span text:style-name="T41">Unused Media</text:span><text:span text:style-name="T41"><text:line-break/></text:span><text:span text:style-name="T41"><text:line-break/></text:span><text:span text:style-name="T41">calculus_2026-06-18-cover.jpg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3">5. Cache Version Generation</text:p>
      <text:p text:style-name="P33">Build System은 변경 사항이 발생하면 새로운 Cache Version을 생성한다.</text:p>
      <text:p text:style-name="P33">이를 이용하여 브라우저 캐시 문제를 최소화하고 항상 최신 데이터를 불러올 수 있도록 한다.</text:p>
      <text:p text:style-name="P33"/>
      <text:p text:style-name="P33">6. Build Report</text:p>
      <text:p text:style-name="P33">빌드가 끝나면 전체 결과를 출력한다.</text:p>
      <text:p text:style-name="P33"/>
      <text:p text:style-name="P33">예를들어</text:p>
      <text:p text:style-name="P33"/>
      <text:p text:style-name="P33"/>
      <text:p text:style-name="P33"/>
      <text:p text:style-name="P33"/>
      <text:p text:style-name="P33"><draw:frame text:anchor-type="paragraph" draw:z-index="7" draw:name="Text Frame 8" draw:style-name="gr3" draw:text-style-name="P60" svg:width="6.4815in" svg:height="1.7642in" svg:x="-0.0354in" svg:y="-0.1075in"><draw:text-box><text:p><text:span text:style-name="T41">==================================</text:span></text:p><text:p><text:span text:style-name="T41"/></text:p><text:p><text:span text:style-name="T41">LOGIA Build Complete</text:span></text:p><text:p><text:span text:style-name="T41"/></text:p><text:p><text:span text:style-name="T41">Warnings : 0</text:span></text:p><text:p><text:span text:style-name="T41"/></text:p><text:p><text:span text:style-name="T41">Cache Version : 202607041742</text:span></text:p><text:p><text:span text:style-name="T41"/></text:p><text:p><text:span text:style-name="T41">==================================</text:span></text:p></draw:text-box></draw:frame><text:soft-page-break/></text:p>
      <text:p text:style-name="P32"/>
      <text:p text:style-name="P32"/>
      <text:p text:style-name="P31"/>
      <text:p text:style-name="P31"/>
      <text:p text:style-name="P31"/>
      <text:p text:style-name="P31"/>
      <text:p text:style-name="P31"/>
      <text:p text:style-name="P31"/>
      <text:p text:style-name="P33">처럼 현재 프로젝트 상태를 즉시 확인할 수 있다.</text:p>
      <text:p text:style-name="P33"/>
      <text:p text:style-name="P33"/>
      <text:p text:style-name="P4"><text:span text:style-name="T20">Design Philosophy</text:span></text:p>
      <text:p text:style-name="P33"/>
      <text:p text:style-name="P33">LOGIA Build System은 다음 원칙을 따른다.</text:p>
      <text:p text:style-name="P34"><text:span text:style-name="T3">· 사용자는 학습만 한다.</text:span></text:p>
      <text:p text:style-name="P34"><text:span text:style-name="T3">· 컴퓨터는 반복 작업을 수행한다.</text:span></text:p>
      <text:p text:style-name="P33"><text:span text:style-name="T3">· 모든 데이터는 자동으로 생성된다.</text:span></text:p>
      <text:p text:style-name="P33"><text:span text:style-name="T3">· 사람이 직접 JSON을 수정하지 않는다.</text:span></text:p>
      <text:p text:style-name="P33"><text:span text:style-name="T3">· 정적 홈페이지에서도 데이터베이스처럼 동작할 수 있도록 설계한다.</text:span></text:p>
      <text:p text:style-name="P33"><text:span text:style-name="T3"/></text:p>
      <text:p text:style-name="P33"><text:span text:style-name="T3"/></text:p>
      <text:p text:style-name="P7"><text:span text:style-name="T3">Advantages</text:span></text:p>
      <text:p text:style-name="P7"><text:span text:style-name="T4"/></text:p>
      <text:p text:style-name="P7"><text:span text:style-name="T4">LOGIA Build System을 사용하면</text:span></text:p>
      <text:p text:style-name="P33"><text:span text:style-name="T3">· 학습 기록 작성이 매우 단순해지고</text:span></text:p>
      <text:p text:style-name="P33"><text:span text:style-name="T3">· 데이터 입력 오류를 줄일 수 있으며</text:span></text:p>
      <text:p text:style-name="P33"><text:span text:style-name="T3">· 홈페이지의 모든 데이터가 자동으로 동기화되고</text:span></text:p>
      <text:p text:style-name="P33"><text:span text:style-name="T3">· 새로운 과목을 추가하더라도 동일한 방식으로 관리할 수 있다.</text:span></text:p>
      <text:p text:style-name="P33"><text:span text:style-name="T3"/></text:p>
      <text:p text:style-name="P33"><text:span text:style-name="T3"/></text:p>
      <text:p text:style-name="P40">The Build System serves as the data engine of LOG<text:span text:style-name="T34">I</text:span>A School, transforming simple study records into structured data for the entire website.</text:p>
      <text:p text:style-name="P4"><text:span text:style-name="T30"/></text:p>
      <text:p text:style-name="P4"><text:span text:style-name="T30"/></text:p>
      <text:p text:style-name="P4"><text:span text:style-name="T30"/></text:p>
      <text:p text:style-name="P4"><text:span text:style-name="T30"/></text:p>
      <text:p text:style-name="P4"><text:span text:style-name="T30"/></text:p>
      <text:p text:style-name="P4"><text:span text:style-name="T30"/></text:p>
      <text:p text:style-name="P4"><text:span text:style-name="T30"/></text:p>
      <text:p text:style-name="P4"><text:span text:style-name="T30"/></text:p>
      <text:p text:style-name="P4"><text:span text:style-name="T30"/></text:p>
      <text:p text:style-name="P4"><text:span text:style-name="T30"/></text:p>
      <text:p text:style-name="P4"><text:span text:style-name="T30"/></text:p>
      <text:p text:style-name="P4"><text:span text:style-name="T30"/></text:p>
      <text:p text:style-name="P4"><text:span text:style-name="T30"/></text:p>
      <text:p text:style-name="P4"><text:span text:style-name="T30"/></text:p>
      <text:p text:style-name="P4"><text:span text:style-name="T30"/></text:p>
      <text:p text:style-name="P4"><text:span text:style-name="T30"/></text:p>
      <text:p text:style-name="P4"><text:soft-page-break/><text:span text:style-name="T30">Study Board</text:span></text:p>
      <text:p text:style-name="P1"/>
      <text:p text:style-name="P8">LOGIA Study Board</text:p>
      <text:p text:style-name="P35"/>
      <text:p text:style-name="P35">Study Board는 LOGIA School의 핵심 학습 인터페이스이다.</text:p>
      <text:p text:style-name="P35"/>
      <text:p text:style-name="P35">학습자는 달력을 기준으로 원하는 날짜를 선택하여 해당 날짜의 학습 기록을 확인할 수 있으며, 메모, 진도, 학습 시간, 첨부 자료를 하나의 화면에서 관리할 수 있다.</text:p>
      <text:p text:style-name="P35"/>
      <text:p text:style-name="P35">Study Board는 Build System이 생성한 JSON 데이터를 이용하여 모든 학습 정보를 동적으로 표시한다.</text:p>
      <text:p text:style-name="P35"/>
      <text:p text:style-name="P35"/>
      <text:p text:style-name="P8">Purpose</text:p>
      <text:p text:style-name="P8"/>
      <text:p text:style-name="P35">Study Board는 단순한 메모장이 아니라 <text:span text:style-name="T22">학습 이력을 시간순으로 관리하는 학습 기록 시스템</text:span>을 목표로 한다.</text:p>
      <text:p text:style-name="P35">매일의 학습 내용을 축적하고, 시간이 지남에 따라 자신의 학습 과정을 하눈에 확인할 수 있도록 설계되었다.</text:p>
      <text:p text:style-name="P1"/>
      <text:p text:style-name="P1"/>
      <text:p text:style-name="P4"><text:span text:style-name="T21">Main Components</text:span></text:p>
      <text:p text:style-name="P4"/>
      <text:p text:style-name="P38">Study Board는 네 개의 주요 영역으로 구성된다.</text:p>
      <text:p text:style-name="P38"/>
      <text:p text:style-name="P38"><text:span text:style-name="T10">&lt;</text:span>Calendar&gt;</text:p>
      <text:p text:style-name="P38">학습한 날짜를 달력에 표시한다.</text:p>
      <text:p text:style-name="P38">날짜를 선택하면 해당 날짜의 학습 기록을 즉시 불러온다.</text:p>
      <text:p text:style-name="P1"/>
      <text:p text:style-name="P2"><text:span text:style-name="T10">&lt;</text:span><text:span text:style-name="T21">Subject Information&gt;</text:span></text:p>
      <text:p text:style-name="P38">과목의 전체 학습 현황을 표시한다.</text:p>
      <text:p text:style-name="P38"/>
      <text:p text:style-name="P38">예를 들어,</text:p>
      <text:p text:style-name="P38"><text:span text:style-name="T6">· 학습 시작일</text:span></text:p>
      <text:p text:style-name="P38"><text:span text:style-name="T6">· 최근 학습일</text:span></text:p>
      <text:p text:style-name="P38"><text:span text:style-name="T6">· 총 학습일</text:span></text:p>
      <text:p text:style-name="P38"><text:span text:style-name="T6">· 현재 진도율</text:span></text:p>
      <text:p text:style-name="P38"><text:span text:style-name="T6">· 현재 학습 위치</text:span></text:p>
      <text:p text:style-name="P38">등의 정보를 제공한다.</text:p>
      <text:p text:style-name="P38"/>
      <text:p text:style-name="P39"><text:span text:style-name="T13">&lt;</text:span>Study Memo&gt;</text:p>
      <text:p text:style-name="P38">선택한 날짜의 학습 메모를 표시한다.</text:p>
      <text:p text:style-name="P38">그날 이해한 내용이나 중요한 개념, 다음 학습 계획 등을 기록하는 공간이다.</text:p>
      <text:p text:style-name="P38"/>
      <text:p text:style-name="P39"><text:span text:style-name="T10">&lt;</text:span>Learning Materials&gt;</text:p>
      <text:p text:style-name="P38">해당 날짜에 생성된 학습 자료를 표시한다.</text:p>
      <text:p text:style-name="P38">예를 들어,</text:p>
      <text:p text:style-name="P38"><text:span text:style-name="T6">· </text:span><text:span text:style-name="T4">PDF</text:span></text:p>
      <text:p text:style-name="P38"><text:span text:style-name="T6">· </text:span><text:span text:style-name="T4">JPG</text:span></text:p>
      <text:p text:style-name="P38"><text:span text:style-name="T6">· </text:span><text:span text:style-name="T4">ODT </text:span></text:p>
      <text:p text:style-name="P38">등의 자료를 바로 열람할 수 있다.</text:p>
      <text:p text:style-name="P38"/>
      <text:p text:style-name="P38"/>
      <text:p text:style-name="P38"><text:soft-page-break/><text:span text:style-name="T22">Data Flow</text:span></text:p>
      <text:p text:style-name="P8"/>
      <text:p text:style-name="P38">Study Board는 다음과 같은 흐름으로 동작한다.</text:p>
      <text:p text:style-name="P38"><draw:frame text:anchor-type="paragraph" draw:z-index="8" draw:name="Text Frame 9" draw:style-name="gr2" draw:text-style-name="P60" svg:width="6.4815in" svg:height="3.9976in" svg:x="-0.0563in" svg:y="0.0929in"><draw:text-box><text:p><text:span text:style-name="T41">TXT Study Records</text:span></text:p><text:p><text:span text:style-name="T41"/></text:p><text:p><text:span text:style-name="T41"><text:tab/></text:span><text:span text:style-name="T41">↓</text:span></text:p><text:p><text:span text:style-name="T41"/></text:p><text:p><text:span text:style-name="T41">LOGIA Build System</text:span></text:p><text:p><text:span text:style-name="T37"/></text:p><text:p><text:span text:style-name="T37"><text:tab/></text:span><text:span text:style-name="T37">↓</text:span></text:p><text:p><text:span text:style-name="T37"/></text:p><text:p><text:span text:style-name="T37">JSON Database</text:span></text:p><text:p><text:span text:style-name="T37"/></text:p><text:p><text:span text:style-name="T37"><text:tab/></text:span><text:span text:style-name="T37">↓</text:span></text:p><text:p><text:span text:style-name="T37"/></text:p><text:p><text:span text:style-name="T36">Study Board</text:span></text:p><text:p><text:span text:style-name="T37"/></text:p><text:p><text:span text:style-name="T37"><text:tab/></text:span><text:span text:style-name="T37">↓</text:span></text:p><text:p><text:span text:style-name="T37"/></text:p><text:p><text:span text:style-name="T37">Calendar Selection</text:span></text:p><text:p><text:span text:style-name="T37"/></text:p><text:p><text:span text:style-name="T37"><text:tab/></text:span><text:span text:style-name="T37"><text:tab/></text:span><text:span text:style-name="T37">↓</text:span></text:p><text:p><text:span text:style-name="T37"/></text:p><text:p><text:span text:style-name="T37">Display Study Record</text:span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"/>
      <text:p text:style-name="P1"/>
      <text:p text:style-name="P16"/>
      <text:p text:style-name="P16"/>
      <text:p text:style-name="P16"/>
      <text:p text:style-name="P16">Design Philosophy</text:p>
      <text:p text:style-name="P45"/>
      <text:p text:style-name="P45">Study Board는 다음 원칙을 기반으로 설계되었다.</text:p>
      <text:p text:style-name="P45"><text:span text:style-name="T3"><text:s/>· 날짜 중심으로 학습을 관리한다.</text:span></text:p>
      <text:p text:style-name="P45"><text:span text:style-name="T3"><text:s/>· 학습 자료와 기록을 하나의 화면에서 확인한다.</text:span></text:p>
      <text:p text:style-name="P45"><text:span text:style-name="T3"><text:s/>· 사용자가 데이터를 직접 수정하지 않는다.</text:span></text:p>
      <text:p text:style-name="P45"><text:span text:style-name="T3"><text:s/>· Build System이 생성한 데이트를 그대로 활용한다.</text:span></text:p>
      <text:p text:style-name="P45"><text:span text:style-name="T3"><text:s/>· 과목이 추가되어도 동일한 인터페이스를 유지한다.</text:span> </text:p>
      <text:p text:style-name="P1"/>
      <text:p text:style-name="P1"/>
      <text:p text:style-name="P4"><text:span text:style-name="T24">Advantages</text:span></text:p>
      <text:p text:style-name="P4"/>
      <text:p text:style-name="P45">Study Board는</text:p>
      <text:p text:style-name="P45"><text:span text:style-name="T3">·</text:span> 학습 기록을 체계적으로 관리할 수 있고</text:p>
      <text:p text:style-name="P45"><text:span text:style-name="T3">·</text:span> 하루의 학습 내용을 빠르게 되돌아볼 수 있으며</text:p>
      <text:p text:style-name="P45"><text:span text:style-name="T3">·</text:span> <text:s/>진도와 학습 자료를 함께 관리할 수 있고</text:p>
      <text:p text:style-name="P45"><text:span text:style-name="T3">·</text:span> <text:s/>모든 과목에서 동일한 인터페이스를 제공하여 사용성을 높인다.</text:p>
      <text:p text:style-name="P1"/>
      <text:p text:style-name="P1"/>
      <text:p text:style-name="P4"><text:span text:style-name="T24">Future</text:span></text:p>
      <text:p text:style-name="P4"/>
      <text:p text:style-name="P45">향후 Study Board에는 다음과 같은 기능이 추가될 예정이다.</text:p>
      <text:p text:style-name="P45"><text:span text:style-name="T3">·</text:span> 학습 통계 및 그래프</text:p>
      <text:p text:style-name="P45"><text:span text:style-name="T3">·</text:span> 월별<text:span text:style-name="T3"> 연도별 학습 분석</text:span></text:p>
      <text:p text:style-name="P45"><text:soft-page-break/><text:span text:style-name="T3">· 과목 간 학습 시간 비교</text:span></text:p>
      <text:p text:style-name="P45"><text:span text:style-name="T3">· 검색 기능</text:span></text:p>
      <text:p text:style-name="P45"><text:span text:style-name="T3">· 학습 태그 및 키워드 관리</text:span></text:p>
      <text:p text:style-name="P45"><text:span text:style-name="T3">· PDF 및 노트 미리보기</text:span></text:p>
      <text:p text:style-name="P45"><text:span text:style-name="T3">· 모바일 환경 최적화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9">Future Roadmap</text:span></text:p>
      <text:p text:style-name="P1"/>
      <text:p text:style-name="P56">LOGIA School은 지속적으로 발전하는 장기 프로젝트이다.</text:p>
      <text:p text:style-name="P56"/>
      <text:p text:style-name="P56">현재는 학습 기록과 과목 관리 시스템을 중심으로 구성되어 있으며, 앞으로는 교육 콘텐츠와 학습 분석 기능을 단계적으로 확장해 나갈 계획이다.</text:p>
      <text:p text:style-name="P56"/>
      <text:p text:style-name="P56">궁극적인 목표는 개인의 학습을 수십 년 동안 기록하고 관리할 수 있는 <text:span text:style-name="T22">Personal University</text:span>를 구축하는 것이다.</text:p>
      <text:p text:style-name="P1"/>
      <text:p text:style-name="P1"/>
      <text:p text:style-name="P4"><text:span text:style-name="T31">Planned Features</text:span></text:p>
      <text:p text:style-name="P39"><text:span text:style-name="T13"/></text:p>
      <text:p text:style-name="P39"><text:span text:style-name="T13">Education</text:span></text:p>
      <text:p text:style-name="P39"><text:span text:style-name="T10">·</text:span><text:span text:style-name="T13"> 과목 확대</text:span></text:p>
      <text:p text:style-name="P39"><text:span text:style-name="T10">·</text:span><text:span text:style-name="T13"> 강의 노트 추가</text:span></text:p>
      <text:p text:style-name="P39"><text:span text:style-name="T10">·</text:span><text:span text:style-name="T13"> 실습 자료 구축</text:span></text:p>
      <text:p text:style-name="P39"><text:span text:style-name="T10">·</text:span><text:span text:style-name="T13"> PDF 교재 제공</text:span></text:p>
      <text:p text:style-name="P39"><text:span text:style-name="T13"/></text:p>
      <text:p text:style-name="P39"><text:span text:style-name="T13">Study Board</text:span></text:p>
      <text:p text:style-name="P39"><text:span text:style-name="T10">·</text:span><text:span text:style-name="T13"> 학습통계</text:span></text:p>
      <text:p text:style-name="P39"><text:span text:style-name="T10">·</text:span><text:span text:style-name="T13"> 진도 그래프</text:span></text:p>
      <text:p text:style-name="P39"><text:span text:style-name="T10">·</text:span><text:span text:style-name="T13"> 연간 학습 분석</text:span></text:p>
      <text:p text:style-name="P39"><text:span text:style-name="T10">·</text:span><text:span text:style-name="T13"> 검색 기능</text:span></text:p>
      <text:p text:style-name="P39"><text:span text:style-name="T10">·</text:span><text:span text:style-name="T13"> 태그 시스템</text:span></text:p>
      <text:p text:style-name="P39"><text:span text:style-name="T13"/></text:p>
      <text:p text:style-name="P39"><text:span text:style-name="T13">Build System</text:span></text:p>
      <text:p text:style-name="P39"><text:span text:style-name="T10">·</text:span><text:span text:style-name="T13"> LSF 확장</text:span></text:p>
      <text:p text:style-name="P39"><text:span text:style-name="T10">·</text:span><text:span text:style-name="T13"> 자동 미디어 관리</text:span></text:p>
      <text:p text:style-name="P39"><text:span text:style-name="T10">·</text:span><text:span text:style-name="T13"> 빌드 최적화</text:span></text:p>
      <text:p text:style-name="P39"><text:span text:style-name="T10">·</text:span><text:span text:style-name="T13"> 데이터 검증 강화 </text:span></text:p>
      <text:p text:style-name="P56"/>
      <text:p text:style-name="P56">Website</text:p>
      <text:p text:style-name="P39"><text:span text:style-name="T10">·</text:span><text:span text:style-name="T13"> 반응형 UI 개선</text:span></text:p>
      <text:p text:style-name="P39"><text:span text:style-name="T10">·</text:span><text:span text:style-name="T13"> 다국어 지원</text:span></text:p>
      <text:p text:style-name="P39"><text:span text:style-name="T10">·</text:span><text:span text:style-name="T13"> 접근성 향상</text:span></text:p>
      <text:p text:style-name="P39"><text:span text:style-name="T10">·</text:span><text:span text:style-name="T13"> 성능 최적화</text:span></text:p>
      <text:p text:style-name="P39"><text:span text:style-name="T13"/></text:p>
      <text:p text:style-name="P39"><text:span text:style-name="T13"/></text:p>
      <text:p text:style-name="P9"><text:span text:style-name="T13">Long-term Goals</text:span></text:p>
      <text:p text:style-name="P9"><text:span text:style-name="T13"/></text:p>
      <text:p text:style-name="P39"><text:span text:style-name="T10">·</text:span><text:span text:style-name="T13"> complete Personal University</text:span></text:p>
      <text:p text:style-name="P39"><text:span text:style-name="T10">·</text:span><text:span text:style-name="T13"> Hundreds of Subjects</text:span></text:p>
      <text:p text:style-name="P39"><text:span text:style-name="T10">·</text:span><text:span text:style-name="T13"> Lifelong Learning Archive</text:span></text:p>
      <text:p text:style-name="P39"><text:span text:style-name="T10">·</text:span><text:span text:style-name="T13"> Open Educational Resources</text:span></text:p>
      <text:p text:style-name="P39"><text:span text:style-name="T10">·</text:span><text:span text:style-name="T13"> Sustainable Knowledge Management</text:span></text:p>
      <text:p text:style-name="P39"><text:span text:style-name="T13"/></text:p>
      <text:p text:style-name="P39"><text:span text:style-name="T13"/></text:p>
      <text:p text:style-name="P43"><text:span text:style-name="T13">L</text:span><text:span text:style-name="T12">OGIA School is not intended to be completed quickly. It is designed to grow together with its learner.</text:span></text:p>
      <text:p text:style-name="P49"><text:span text:style-name="T12">(로기아 스쿨은 단기간에 완성되는 프로젝트가 아니라, 학습자와 함께 성장하도록 설계된 프로젝트이다.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ot" draw:style="rect" draw:dots1="1" draw:dots1-length="10%" draw:distance="1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4T21:58:23.405459547</meta:creation-date>
    <meta:generator>LibreOffice/24.2.7.2$Linux_X86_64 LibreOffice_project/420$Build-2</meta:generator>
    <dc:date>2026-07-05T05:03:39.334599911</dc:date>
    <meta:editing-duration>PT1H32M6S</meta:editing-duration>
    <meta:editing-cycles>24</meta:editing-cycles>
    <meta:document-statistic meta:table-count="0" meta:image-count="0" meta:object-count="0" meta:page-count="15" meta:paragraph-count="276" meta:word-count="4554" meta:character-count="8854" meta:non-whitespace-character-count="7190"/>
  </office:meta>
</office:document-meta>
</file>